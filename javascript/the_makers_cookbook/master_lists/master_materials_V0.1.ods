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2.7752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48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3.2374in"/>
    </style:style>
    <style:style style:name="co12" style:family="table-column">
      <style:table-column-properties fo:break-before="auto" style:column-width="0.6689in"/>
    </style:style>
    <style:style style:name="co13" style:family="table-column">
      <style:table-column-properties fo:break-before="auto" style:column-width="1.6957in"/>
    </style:style>
    <style:style style:name="co14" style:family="table-column">
      <style:table-column-properties fo:break-before="auto" style:column-width="4.6252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Materials">
      <style:table-properties table:display="true" style:writing-mode="lr-tb"/>
    </style:style>
    <style:style style:name="ta2" style:family="table" style:master-page-name="PageStyle_5f_Legen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888888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eae8fd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c348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0.74pt solid #e0e0e0" fo:background-color="#ede9fe" style:diagonal-bl-tr="none" style:diagonal-tl-br="none" style:text-align-source="fix" style:repeat-content="false" fo:wrap-option="no-wrap" fo:border-left="0.74pt solid #e0e0e0" style:direction="ltr" fo:border-right="none" style:rotation-angle="0" style:rotation-align="none" style:shrink-to-fit="false" fo:border-top="0.74pt solid #e0e0e0" style:vertical-align="middle" loext:vertical-justify="auto"/>
      <style:paragraph-properties fo:text-align="start" css3t:text-justify="auto" fo:margin-left="0in" style:writing-mode="page"/>
      <style:text-properties fo:color="#4c1d95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ede9fe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4c1d95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e0e0e0" fo:background-color="#d1fae5" style:diagonal-bl-tr="none" style:diagonal-tl-br="none" style:text-align-source="fix" style:repeat-content="false" fo:wrap-option="no-wrap" fo:border-left="0.74pt solid #e0e0e0" style:direction="ltr" fo:border-right="none" style:rotation-angle="0" style:rotation-align="none" style:shrink-to-fit="false" fo:border-top="0.74pt solid #e0e0e0" style:vertical-align="middle" loext:vertical-justify="auto"/>
      <style:paragraph-properties fo:text-align="start" css3t:text-justify="auto" fo:margin-left="0in" style:writing-mode="page"/>
      <style:text-properties fo:color="#065f4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d1fae5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65f4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order-bottom="0.74pt solid #e0e0e0" fo:background-color="#fef3c7" style:diagonal-bl-tr="none" style:diagonal-tl-br="none" style:text-align-source="fix" style:repeat-content="false" fo:wrap-option="no-wrap" fo:border-left="0.74pt solid #e0e0e0" style:direction="ltr" fo:border-right="none" style:rotation-angle="0" style:rotation-align="none" style:shrink-to-fit="false" fo:border-top="0.74pt solid #e0e0e0" style:vertical-align="middle" loext:vertical-justify="auto"/>
      <style:paragraph-properties fo:text-align="start" css3t:text-justify="auto" fo:margin-left="0in" style:writing-mode="page"/>
      <style:text-properties fo:color="#92400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ef3c7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92400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e0e0e0" fo:background-color="#dbeafe" style:diagonal-bl-tr="none" style:diagonal-tl-br="none" style:text-align-source="fix" style:repeat-content="false" fo:wrap-option="no-wrap" fo:border-left="0.74pt solid #e0e0e0" style:direction="ltr" fo:border-right="none" style:rotation-angle="0" style:rotation-align="none" style:shrink-to-fit="false" fo:border-top="0.74pt solid #e0e0e0" style:vertical-align="middle" loext:vertical-justify="auto"/>
      <style:paragraph-properties fo:text-align="start" css3t:text-justify="auto" fo:margin-left="0in" style:writing-mode="page"/>
      <style:text-properties fo:color="#1e3a5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dbeafe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e3a5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fafaf8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1111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1111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afaf8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111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111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ackground-color="#fafaf8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888888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888888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8" style:family="table-cell" style:parent-style-name="Default">
      <style:table-cell-properties fo:background-color="#fafaf8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65f4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65f4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eaf3de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27500a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ackground-color="#faeeda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63380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fo:background-color="#fcebeb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791f1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fo:background-color="#f5e6fb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5b127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ackground-color="#f5f5f5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44444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ackground-color="#fff7ed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a341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fo:background-color="#fef3c7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2400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fo:background-color="#ecfdf5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65f4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fo:background-color="#fef9c3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713f1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fo:background-color="#fee2e2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91b1b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ackground-color="#ffedd5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a341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#f3e8ff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6b21a8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ackground-color="#fce7f3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d174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ackground-color="#dcfce7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66534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ee2e2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91b1b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fef9c3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713f1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ef9c3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713f12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fo:background-color="#f5f5f5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888888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ackground-color="#1e3a5f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fo:background-color="#dbeafe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e3a5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ackground-color="#dcfce7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6653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ackground-color="#fef9c3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713f1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ackground-color="#fee2e2" style:diagonal-bl-tr="none" style:diagonal-tl-br="none" style:text-align-source="fix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91b1b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ackground-color="#eae8fd" style:diagonal-bl-tr="none" style:diagonal-tl-br="none" style:text-align-source="value-type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c348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e0e0e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14"/>
        <table:table-column table:style-name="co4" table:default-cell-style-name="ce16"/>
        <table:table-column table:style-name="co5" table:default-cell-style-name="ce18"/>
        <table:table-column table:style-name="co6" table:default-cell-style-name="ce20"/>
        <table:table-column table:style-name="co2" table:default-cell-style-name="ce24"/>
        <table:table-column table:style-name="co7" table:default-cell-style-name="ce34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2" table:number-columns-repeated="2" table:default-cell-style-name="ce34"/>
        <table:table-column table:style-name="co2" table:default-cell-style-name="ce37"/>
        <table:table-column table:style-name="co1" table:default-cell-style-name="ce38"/>
        <table:table-column table:style-name="co11" table:default-cell-style-name="ce12"/>
        <table:table-column table:style-name="co12" table:number-columns-repeated="1636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Master Materials List</text:p>
          </table:table-cell>
          <table:covered-table-cell table:number-columns-repeated="15" table:style-name="Default"/>
          <table:table-cell table:number-columns-repeated="16368"/>
        </table:table-row>
        <table:table-row table:style-name="ro2">
          <table:table-cell table:style-name="ce2" office:value-type="string" calcext:value-type="string" table:number-columns-spanned="16" table:number-rows-spanned="1">
            <text:p>355 materials — Grocery · Foraged · Craft · Industrial</text:p>
          </table:table-cell>
          <table:covered-table-cell table:number-columns-repeated="15" table:style-name="Default"/>
          <table:table-cell table:number-columns-repeated="16368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Safety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Vegetarian</text:p>
          </table:table-cell>
          <table:table-cell table:style-name="ce3" office:value-type="string" calcext:value-type="string">
            <text:p>Vegan</text:p>
          </table:table-cell>
          <table:table-cell table:style-name="ce3" office:value-type="string" calcext:value-type="string">
            <text:p>Biodegradable</text:p>
          </table:table-cell>
          <table:table-cell table:style-name="ce3" office:value-type="string" calcext:value-type="string">
            <text:p>Grow Your Own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Waterproof</text:p>
          </table:table-cell>
          <table:table-cell table:style-name="ce3" office:value-type="string" calcext:value-type="string">
            <text:p>Longevity</text:p>
          </table:table-cell>
          <table:table-cell table:style-name="ce3" office:value-type="string" calcext:value-type="string">
            <text:p>Uses</text:p>
          </table:table-cell>
          <table:table-cell table:number-columns-repeated="16368"/>
        </table:table-row>
        <table:table-row table:style-name="ro4">
          <table:table-cell table:style-name="ce4" office:value-type="string" calcext:value-type="string" table:number-columns-spanned="16" table:number-rows-spanned="1">
            <text:p>CRAFT</text:p>
          </table:table-cell>
          <table:covered-table-cell table:number-columns-repeated="15" table:style-name="Default"/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Watercolor binder, lithography, ink additive, adhesiv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Rubber Cement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Temporary adhesive for paper, resist for etch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Alginat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ody casting, food-safe mold-making, dental impressions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Sodium Alginate</text:p>
          </table:table-cell>
          <table:table-cell office:value-type="string" calcext:value-type="string">
            <text:p>Spherification, printable casting, food-safe molds.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Casting, printing, food-safe mold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Ceramic</text:p>
          </table:table-cell>
          <table:table-cell table:style-name="ce15" office:value-type="string" calcext:value-type="string">
            <text:p>Ceramic Glaz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eramic surface finish, color, waterproof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Ball Clay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eramics, slip, glaze, modell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Clay</text:p>
          </table:table-cell>
          <table:table-cell table:style-name="ce15" office:value-type="string" calcext:value-type="string">
            <text:p>Clay Slip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eramic joining, casting, surface coat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arthenware Clay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Hand-building, wheel throwing, tiles, sculptur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Clay</text:p>
          </table:table-cell>
          <table:table-cell table:style-name="ce15" office:value-type="string" calcext:value-type="string">
            <text:p>Mexican Paste / Florist Past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Fine modelling, flower making, cake decoratio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Oil Clay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Modelling, maquette, prototype — non-harden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Clay</text:p>
          </table:table-cell>
          <table:table-cell table:style-name="ce15" office:value-type="string" calcext:value-type="string">
            <text:p>Polymer Clay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odelling, jewellery, fine detail work — oven-cur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Porcelain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ine ceramics, tableware, electrical insulators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Clay</text:p>
          </table:table-cell>
          <table:table-cell table:style-name="ce15" office:value-type="string" calcext:value-type="string">
            <text:p>Terracotta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ottery, tiles, sculpture, garden war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Weld (Reseda luteola)</text:p>
          </table:table-cell>
          <table:table-cell office:value-type="string" calcext:value-type="string">
            <text:p>Best historical European yellow dye plant. Very lightfast with alum mordant. Biennial, easy to grow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Natural yellow dye, lake pigment making, over-dyeing for gree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Conductive Clay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Educational circuits, soft electronics, modell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raphit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Drawing, conductive coating, dry lubricant, electronics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Graphite Stick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Drawing, conductive coating, shield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Pencil Graphit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Drawing, conductive traces on paper, dry lubricant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Bookcloth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Bookbinding cover, conservatio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Buckra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Bookbinding stiffener, millinery, garment constructio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Burlap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Reinforcement, armature, papier-mache, texture, composite fiber, upholstery bas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Canva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Painting surface, reinforcement, upholstery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Felted Wool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Structure, padding, surface material, hat-mak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Kozo / Mulberry Fiber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Japanese papermaking, fiber reinforcement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Linen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Bookbinding, canvas, fiber reinforcement, upholstery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Muslin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Armature skin, bookbinding, pattern making, mold releas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Ink</text:p>
          </table:table-cell>
          <table:table-cell table:style-name="ce15" office:value-type="string" calcext:value-type="string">
            <text:p>India Ink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Drawing, printmaking, illustration — permanent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Water based inks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Screen printing, block printing, fabric print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Metal</text:p>
          </table:table-cell>
          <table:table-cell table:style-name="ce15" office:value-type="string" calcext:value-type="string">
            <text:p>Gold Leaf</text:p>
          </table:table-cell>
          <table:table-cell table:style-name="ce17"/>
          <table:table-cell table:style-name="ce19" office:value-type="string" calcext:value-type="string">
            <text:p>$$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Gilding, decorative surface, conservatio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Silver Leaf</text:p>
          </table:table-cell>
          <table:table-cell/>
          <table:table-cell office:value-type="string" calcext:value-type="string">
            <text:p>$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Gilding, decorative surfac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Mica/Isinglass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earlescent pigment additive, heat-resistant window, electrical insulator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Pumice Powder</text:p>
          </table:table-cell>
          <table:table-cell office:value-type="string" calcext:value-type="string">
            <text:p>Volcanic glass. Abrasive additive, glaze texture, polishing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Abrasive, glaze additive, surface prep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Soap Ston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rving, mold-making for low-temp metals, draw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Hemp Oil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Drying oil finish, paint medium, skin car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Oil</text:p>
          </table:table-cell>
          <table:table-cell table:style-name="ce15" office:value-type="string" calcext:value-type="string">
            <text:p>Poppy Oil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Slow-drying paint medium, pale color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Walnut Oil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Drying oil finish, paint medium, wood treatment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aint</text:p>
          </table:table-cell>
          <table:table-cell table:style-name="ce15" office:value-type="string" calcext:value-type="string">
            <text:p>Acrylic Medium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Paint extender, gel medium, varnish, texture additiv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Acrylic Paint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General purpose paint, paint medium, surface coat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aint</text:p>
          </table:table-cell>
          <table:table-cell table:style-name="ce15" office:value-type="string" calcext:value-type="string">
            <text:p>Milk Paint</text:p>
          </table:table-cell>
          <table:table-cell table:style-name="ce17" office:value-type="string" calcext:value-type="string">
            <text:p>Organic, Vegetarian, Not Vegan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Interior paint, furniture finish, historically authentic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Oil Paint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Traditional painting, slow drying, blending, glaz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aint</text:p>
          </table:table-cell>
          <table:table-cell table:style-name="ce15" office:value-type="string" calcext:value-type="string">
            <text:p>Underglaz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eramic surface color applied before glaze fir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ogus Paper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ookbinding, papier-mache, temporary surfac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aper</text:p>
          </table:table-cell>
          <table:table-cell table:style-name="ce15" office:value-type="string" calcext:value-type="string">
            <text:p>Chiyogami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Decorative surface, bookbinding, collag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yanotype Paper (Prepared)</text:p>
          </table:table-cell>
          <table:table-cell office:value-type="string" calcext:value-type="string">
            <text:p>Paper coated with ferric ammonium citrate and potassium ferricyanide. Produces Prussian blue photograms.</text:p>
          </table:table-cell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Alternative photography, photograms, UV-sensitive surface design, blueprint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aper</text:p>
          </table:table-cell>
          <table:table-cell table:style-name="ce15" office:value-type="string" calcext:value-type="string">
            <text:p>Fabriano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Printmaking, watercolor, draw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Kozo Paper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Bookbinding, conservation repair, printing, collag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aper</text:p>
          </table:table-cell>
          <table:table-cell table:style-name="ce15" office:value-type="string" calcext:value-type="string">
            <text:p>Lokta Paper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Bookbinding, printing, wrapp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ste Paper</text:p>
          </table:table-cell>
          <table:table-cell office:value-type="string" calcext:value-type="string">
            <text:p>Starch paste applied to paper and textured wet. Traditional German bookbinding decoration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ookbinding endpapers, decorative paper, marbling alternative, surface desig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Bone Black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igment — calcined bone, cool black, high tinting strength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Chalk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Drawing, pigment, whiting, mark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Cochineal (Carmine)</text:p>
          </table:table-cell>
          <table:table-cell table:style-name="ce17" office:value-type="string" calcext:value-type="string">
            <text:p>Insect-derived vivid red-pink. Very strong. Pre-Columbian origin. pH-sensitive: acid=orange, alkali=purple.</text:p>
          </table:table-cell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Natural red pigment, lake pigment, fabric dye, food color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Copper Carbonate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Green pigment, ceramic colorant, patina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Gamboge</text:p>
          </table:table-cell>
          <table:table-cell table:style-name="ce17" office:value-type="string" calcext:value-type="string">
            <text:p>Yellow-orange tree resin from Southeast Asia. Traditional watercolor pigment. Transparent, warm.</text:p>
          </table:table-cell>
          <table:table-cell table:style-name="ce19" office:value-type="string" calcext:value-type="string">
            <text:p>$$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Watercolor pigment, glazing, traditional Asian paint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Indigo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Natural blue vat dye for textiles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Lapis Lazuli</text:p>
          </table:table-cell>
          <table:table-cell table:style-name="ce17"/>
          <table:table-cell table:style-name="ce19" office:value-type="string" calcext:value-type="string">
            <text:p>$$$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Historic blue pigment — ultramarine sourc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Madder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Natural red-orange dye for textiles and leather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Phthalo Pigments (Phthalocyanine)</text:p>
          </table:table-cell>
          <table:table-cell table:style-name="ce17" office:value-type="string" calcext:value-type="string">
            <text:p>Copper phthalocyanine. Intensely strong blue-green range. Non-toxic. Highest tinting strength of common pigments.</text:p>
          </table:table-cell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aint pigment, ink, coloring agent — use sparingly, dominates mixtures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Prussian Blue (PB27)</text:p>
          </table:table-cell>
          <table:table-cell office:value-type="string" calcext:value-type="string">
            <text:p>First modern synthetic pigment, 1704. Cool dark transparent blue. Non-toxic. Accidentally discovered.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aint pigment, ink, cyanotype image IS Prussian blue, historical paint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Quinacridone Pigments</text:p>
          </table:table-cell>
          <table:table-cell table:style-name="ce17" office:value-type="string" calcext:value-type="string">
            <text:p>Synthetic organic pigments, 1958. Vivid transparent reds, pinks, violets. Non-toxic. Replaced alizarin.</text:p>
          </table:table-cell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aint pigment, ink, watercolor, acrylic and oil media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Titanium White (PW6)</text:p>
          </table:table-cell>
          <table:table-cell office:value-type="string" calcext:value-type="string">
            <text:p>Most opaque modern white pigment. Non-toxic. Replaced lead white. Standard in all modern paints.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aint pigment, gesso, primer, white base for all paint media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Woad</text:p>
          </table:table-cell>
          <table:table-cell table:style-name="ce17" office:value-type="string" calcext:value-type="string">
            <text:p>Traditional European blue plant dye and pigment. Same indigo chemistry but lower concentration than tropical indigo.</text:p>
          </table:table-cell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Natural blue pigment, fabric dye, historical painting, lake pigment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Damar Resin</text:p>
          </table:table-cell>
          <table:table-cell/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Varnish, encaustic medium, picture varnish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Resin</text:p>
          </table:table-cell>
          <table:table-cell table:style-name="ce15" office:value-type="string" calcext:value-type="string">
            <text:p>Rosin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Varnish, adhesive, soldering flux, bow rosin, etch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Sealant</text:p>
          </table:table-cell>
          <table:table-cell office:value-type="string" calcext:value-type="string">
            <text:p>Shellac</text:p>
          </table:table-cell>
          <table:table-cell office:value-type="string" calcext:value-type="string">
            <text:p>Organic, Not vegetarian,</text:p>
          </table:table-cell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ealant, UV protection, Water Resistant, Sealant, primer, finish, mixed with alcohol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Sheet</text:p>
          </table:table-cell>
          <table:table-cell table:style-name="ce15" office:value-type="string" calcext:value-type="string">
            <text:p>Horn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rving, sheet material, buttons — thermoplastic when heated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Bookbinding, tooling, strapping, mold mak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Sheet</text:p>
          </table:table-cell>
          <table:table-cell table:style-name="ce15" office:value-type="string" calcext:value-type="string">
            <text:p>Vellum</text:p>
          </table:table-cell>
          <table:table-cell table:style-name="ce17"/>
          <table:table-cell table:style-name="ce19" office:value-type="string" calcext:value-type="string">
            <text:p>$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Bookbinding, manuscripts, drum ski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Glycerin Soap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number-columns-repeated="3" table:style-name="ce35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Casting, embeds, skin-safe mold fill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Surface</text:p>
          </table:table-cell>
          <table:table-cell table:style-name="ce15" office:value-type="string" calcext:value-type="string">
            <text:p>Carrageenan Marbling Bath</text:p>
          </table:table-cell>
          <table:table-cell table:style-name="ce17" office:value-type="string" calcext:value-type="string">
            <text:p>Seaweed gel thickened water surface for traditional paper marbling. Supports floating oil-based inks.</text:p>
          </table:table-cell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Paper marbling, bookbinding endpapers, surface desig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Gesso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Surface preparation for painting, priming canvas and board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Surface</text:p>
          </table:table-cell>
          <table:table-cell table:style-name="ce15" office:value-type="string" calcext:value-type="string">
            <text:p>Heat Transfer Foil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Decorative surface finish, fabric embellishment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Rub and Buff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Metallic surface finish, gilding alternativ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Surface</text:p>
          </table:table-cell>
          <table:table-cell table:style-name="ce15" office:value-type="string" calcext:value-type="string">
            <text:p>Suminagashi</text:p>
          </table:table-cell>
          <table:table-cell table:style-name="ce17" office:value-type="string" calcext:value-type="string">
            <text:p>Japanese ink marbling — ink dropped on water surface, pattern transferred to paper.</text:p>
          </table:table-cell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Decorative paper making, bookbinding endpapers, printmaking, surface design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Filmoplast R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Conservation document and book repair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Tape</text:p>
          </table:table-cell>
          <table:table-cell table:style-name="ce15" office:value-type="string" calcext:value-type="string">
            <text:p>Gummed Linen Tap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Conservation bookbinding, spine lin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issue Repair Tape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Conservation paper repair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Wax</text:p>
          </table:table-cell>
          <table:table-cell table:style-name="ce15" office:value-type="string" calcext:value-type="string">
            <text:p>Bees Wax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urface finish, resist, casting, adhesive, candles, polish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Carnauba Wax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Hard surface polish, wax resist, food coating, release agent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Wax</text:p>
          </table:table-cell>
          <table:table-cell table:style-name="ce15" office:value-type="string" calcext:value-type="string">
            <text:p>Cobbler's Wax (Beeswax + Rosin)</text:p>
          </table:table-cell>
          <table:table-cell table:style-name="ce17" office:value-type="string" calcext:value-type="string">
            <text:p>Historic adhesive and leather finish. Tacky, water-resistant.</text:p>
          </table:table-cell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Adhesive, leather finish, thread waxing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Encaustic Paint</text:p>
          </table:table-cell>
          <table:table-cell/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Hot wax painting — beeswax and pigment, Hot wax painting medium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Wax</text:p>
          </table:table-cell>
          <table:table-cell table:style-name="ce15" office:value-type="string" calcext:value-type="string">
            <text:p>Japan Wax / Bayberry Wax</text:p>
          </table:table-cell>
          <table:table-cell table:style-name="ce17" office:value-type="string" calcext:value-type="string">
            <text:p>Plant-based hard wax. Higher melting point than beeswax.</text:p>
          </table:table-cell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Surface finish, candles, polish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Lanolin</text:p>
          </table:table-cell>
          <table:table-cell office:value-type="string" calcext:value-type="string">
            <text:p>Wool fat — secreted by sheep, extracted during processing. Excellent skin and leather conditioner.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Leather conditioner, skin balm, lubricant, wax additive, hair pomad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Wax</text:p>
          </table:table-cell>
          <table:table-cell table:style-name="ce15" office:value-type="string" calcext:value-type="string">
            <text:p>Paraben Wax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ndles, surface finish, encaustic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Sculpting Wax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ine modelling, maquette, jewellery prototype</text:p>
          </table:table-cell>
          <table:table-cell table:number-columns-repeated="16368"/>
        </table:table-row>
        <table:table-row table:style-name="ro5">
          <table:table-cell table:style-name="ce5" office:value-type="string" calcext:value-type="string">
            <text:p>Craft</text:p>
          </table:table-cell>
          <table:table-cell table:style-name="ce13" office:value-type="string" calcext:value-type="string">
            <text:p>Wax</text:p>
          </table:table-cell>
          <table:table-cell table:style-name="ce15" office:value-type="string" calcext:value-type="string">
            <text:p>Soy Wax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ndles, surface finish, encaustic alternative</text:p>
          </table:table-cell>
          <table:table-cell table:number-columns-repeated="16368"/>
        </table:table-row>
        <table:table-row table:style-name="ro4">
          <table:table-cell table:style-name="ce6" office:value-type="string" calcext:value-type="string" table:number-columns-spanned="16" table:number-rows-spanned="1">
            <text:p>FORAGED</text:p>
          </table:table-cell>
          <table:covered-table-cell table:number-columns-repeated="15" table:style-name="Default"/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Additive</text:p>
          </table:table-cell>
          <table:table-cell office:value-type="string" calcext:value-type="string">
            <text:p>Coffee Ground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Filler, texture, bioplastic additive, natural dy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Additive</text:p>
          </table:table-cell>
          <table:table-cell office:value-type="string" calcext:value-type="string">
            <text:p>Peatmos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Lightweight aggregate for hypertufa, growing medium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Banana Pee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ioplastic source, natural dye, compost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Mycelium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ioplastic composite, packaging, insulation, structur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Orange Pee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ioplastic source, natural dye, oil extraction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SCOBY / Bacterial Cellulose</text:p>
          </table:table-cell>
          <table:table-cell office:value-type="string" calcext:value-type="string">
            <text:p>Cellulose mat produced by kombucha bacteria. Dried into leather-like sheet. Genuinely DIY accessible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ioplastic sheet, experimental leather substitute, material study, packag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Seaweed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ioplastic source, natural dye, agar/carrageenan sourc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Seaweed Gel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ioplastic binder, marbling size, food thickener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Cellulose</text:p>
          </table:table-cell>
          <table:table-cell table:style-name="ce15" office:value-type="string" calcext:value-type="string">
            <text:p>Cardboard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Structure, joinery, armature, packaging, print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Cellulose</text:p>
          </table:table-cell>
          <table:table-cell office:value-type="string" calcext:value-type="string">
            <text:p>Cellulose Pulp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Papier-mache, paper casting, paper clay, handmade paper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Cellulose</text:p>
          </table:table-cell>
          <table:table-cell table:style-name="ce15" office:value-type="string" calcext:value-type="string">
            <text:p>Paper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Drawing, printing, pulp, lamination, packag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Wood Ash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Lye source, glaze flux, soil amendment, mordant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Charcoa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Drawing, conductive ink, activated charcoal, soil amendment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Cattail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Weaving, basketry, insulation, papermak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Coir (Coconut Fiber)</text:p>
          </table:table-cell>
          <table:table-cell table:style-name="ce17" office:value-type="string" calcext:value-type="string">
            <text:p>Coarse brown fiber from coconut husks. Water-resistant, cheap. Traditional upholstery base filling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Upholstery base, composite reinforcement, rope, basketry, matting, hypertufa aggregat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Corn Husk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Weaving, fiber reinforcement, natural packag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Dogbane Fiber</text:p>
          </table:table-cell>
          <table:table-cell table:style-name="ce17" office:value-type="string" calcext:value-type="string">
            <text:p>Native North American bast fiber. Among the strongest natural cordage fibers. Traditional indigenous material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Cordage, traditional textile, basketry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Horse Hair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laster reinforcement, upholstery, traditional build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Horsehair (Curled)</text:p>
          </table:table-cell>
          <table:table-cell table:style-name="ce17" office:value-type="string" calcext:value-type="string">
            <text:p>Traditional top-layer upholstery filling. Resilient, breathable, very durable. Curled for loft and recovery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Traditional upholstery padding, plaster reinforcement, historical restoration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Iris Leave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Weaving, basketry, natural fiber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Milkweed Fiber</text:p>
          </table:table-cell>
          <table:table-cell table:style-name="ce17" office:value-type="string" calcext:value-type="string">
            <text:p>Native wildflower. Strong bast fiber and silky seed floss. Monarch butterfly larval food plant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Cordage, spinning fiber, insulation, seed floss textil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Rice Straw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Fiber reinforcement, papermaking, weaving, bioplastic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Rice/Grain Husk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Lightweight aggregate, bioplastic filler, insulation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awdust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Filler, texture additive, papier-mache, lightweight concret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Seagras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Weaving, basketry, rope, matt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isal Fiber</text:p>
          </table:table-cell>
          <table:table-cell office:value-type="string" calcext:value-type="string">
            <text:p>Natural bast fiber from agave. Traditional rope and composite reinforcement. Documented gypsum reinforcement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Rope and cordage, composite reinforcement for gypsum and plaster, matting, basketry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Stinging Nettle Fiber</text:p>
          </table:table-cell>
          <table:table-cell table:style-name="ce17" office:value-type="string" calcext:value-type="string">
            <text:p>One of strongest natural cordage fibers. Perennial weed, spreads readily. Ret and process like flax.</text:p>
          </table:table-cell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Cordage, textile fiber, papermaking, traditional European fiber plant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eashell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6" office:value-type="string" calcext:value-type="string">
            <text:p>P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alcium carbonate source, mosaic, decoration, mold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Shel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6" office:value-type="string" calcext:value-type="string">
            <text:p>P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osaic, inlay, carving, pigment — calcium carbonat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ewspaper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Papier-mache, armature, packag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aper</text:p>
          </table:table-cell>
          <table:table-cell table:style-name="ce15" office:value-type="string" calcext:value-type="string">
            <text:p>Newsprint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Papier-mache, printing, packaging, draw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Black Walnut Hull</text:p>
          </table:table-cell>
          <table:table-cell office:value-type="string" calcext:value-type="string">
            <text:p>Deep warm brown dye and ink from green outer husk. Very archival. Stains skin permanently — gloves required.</text:p>
          </table:table-cell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Natural brown-black dye and ink, wood staining, mordanting agent, historical ink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Caput Mortuum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Dark violet-red iron oxide pigment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Charcoal Powder</text:p>
          </table:table-cell>
          <table:table-cell office:value-type="string" calcext:value-type="string">
            <text:p>Ground wood charcoal. Deep matte black. Conductive. Free from any fire source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igment, conductive paint additive, drawing, ink, paper pulp additiv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Goldenrod (Solidago)</text:p>
          </table:table-cell>
          <table:table-cell table:style-name="ce17" office:value-type="string" calcext:value-type="string">
            <text:p>Common wildflower. Warm yellow-gold dye with alum mordant. Good lightfastness. Grows across North America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Natural yellow dye, fabric and paper dye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Hematite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Red iron oxide pigment, polishing — specular hematit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Iron Gall Pigment</text:p>
          </table:table-cell>
          <table:table-cell table:style-name="ce17" office:value-type="string" calcext:value-type="string">
            <text:p>Tannins (tea, oak gall) + iron sulfate (rusty nails in vinegar). Traditional brown-black ink and pigment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Natural brown-black pigment, ink, watercolor, historical painting medium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Iron Oxid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igment, rust, ceramic colorant, polishing compound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Lamp Black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igment, ink, drawing — carbon soot based, Pigment for paint and ink, conductive paint additive, DIY carbon black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Limonite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Yellow-brown iron oxide pigment, ochr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Mineral Pigment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igment for paint, plaster coloring, glaze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Onion Skins (Yellow)</text:p>
          </table:table-cell>
          <table:table-cell office:value-type="string" calcext:value-type="string">
            <text:p>Most accessible lightfast natural dye. Brilliant gold-yellow with alum mordant. Food waste source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Natural yellow-gold dye, fabric dyeing, paper dyeing, mordant-free on protein fiber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Red Ochre</text:p>
          </table:table-cell>
          <table:table-cell table:style-name="ce17" office:value-type="string" calcext:value-type="string">
            <text:p>Anhydrous iron oxide. Made by roasting yellow ochre clay. Red-orange. Used since prehistoric times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Natural red pigment, paint, fresco, stain, wood treatment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Terre Verte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Green earth pigment, underpainting, fresco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Verdigris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Historic green pigment — copper acetate, mildly toxic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Vine Black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igment — charred grape vines, warm black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Walnut Ink / Pigment</text:p>
          </table:table-cell>
          <table:table-cell table:style-name="ce17" office:value-type="string" calcext:value-type="string">
            <text:p>Boiled black walnut hulls reduced to paste or powder. Archival warm brown. Stains permanently.</text:p>
          </table:table-cell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Natural brown-black pigment and ink, wood stain, textile dye, historical ink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Wood Ash White</text:p>
          </table:table-cell>
          <table:table-cell office:value-type="string" calcext:value-type="string">
            <text:p>Sifted fine wood ash. Pale gray-white. Can be used as a pigment extender and white tint.</text:p>
          </table:table-cell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igment extender, glaze flux, pale tint, traditional whitewash component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Yellow Ochre (Local Clay)</text:p>
          </table:table-cell>
          <table:table-cell table:style-name="ce17" office:value-type="string" calcext:value-type="string">
            <text:p>Iron-rich yellow clay from local soil. The most ancient pigment. Roast to shift to red ochre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Natural yellow-gold pigment, paint, fresco, stain, cave painting tradition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Pine Resin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Adhesive, varnish, pitch, rosin source, waterproof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Shell</text:p>
          </table:table-cell>
          <table:table-cell table:style-name="ce15" office:value-type="string" calcext:value-type="string">
            <text:p>Cuttlebon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6" office:value-type="string" calcext:value-type="string">
            <text:p>P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etal casting mold, polishing, carving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Animal Fat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Soap-making, candles, leather dressing, lubricant</text:p>
          </table:table-cell>
          <table:table-cell table:number-columns-repeated="16368"/>
        </table:table-row>
        <table:table-row table:style-name="ro5">
          <table:table-cell table:style-name="ce7" office:value-type="string" calcext:value-type="string">
            <text:p>Foraged</text:p>
          </table:table-cell>
          <table:table-cell table:style-name="ce13" office:value-type="string" calcext:value-type="string">
            <text:p>Wax</text:p>
          </table:table-cell>
          <table:table-cell table:style-name="ce15" office:value-type="string" calcext:value-type="string">
            <text:p>Tallow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Candles, soap-making, leather treatment, lubricant</text:p>
          </table:table-cell>
          <table:table-cell table:number-columns-repeated="16368"/>
        </table:table-row>
        <table:table-row table:style-name="ro4">
          <table:table-cell table:style-name="ce8" office:value-type="string" calcext:value-type="string" table:number-columns-spanned="16" table:number-rows-spanned="1">
            <text:p>GROCERY</text:p>
          </table:table-cell>
          <table:covered-table-cell table:number-columns-repeated="15" table:style-name="Default"/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Albumin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inder for pigment, gilding, historical gesso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Casein</text:p>
          </table:table-cell>
          <table:table-cell office:value-type="string" calcext:value-type="string">
            <text:p>Organic, Vegetarian, Not Vegan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Adhesive, paint binder, plastic — derived from milk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Egg Whit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Adhesive, varnish, gilding size, binder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Starch Past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ookbinding adhesive, papier-mache, conservation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Binder</text:p>
          </table:table-cell>
          <table:table-cell table:style-name="ce15" office:value-type="string" calcext:value-type="string">
            <text:p>Egg Yolk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Tempera paint binder, gilding, emulsifier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Egg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Tempera binder, casting, bioplastic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Binder</text:p>
          </table:table-cell>
          <table:table-cell table:style-name="ce15" office:value-type="string" calcext:value-type="string">
            <text:p>Milk</text:p>
          </table:table-cell>
          <table:table-cell table:style-name="ce17" office:value-type="string" calcext:value-type="string">
            <text:p>Organic, Vegetarian, Not Vegan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Casein source, bioplastic, milk paint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Agar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ioplastic, microbiology, food, marbling siz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Carrageenan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Marbling size, bioplastic, food thickener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Gelatin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Bioplastic casting, mold-making, food, photography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Gelatin Sheet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Bioplastic casting, gel filtration, food, photography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Glycerin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Bioplastic plasticizer, soap additive, shelf-life extension, skin car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Pectin</text:p>
          </table:table-cell>
          <table:table-cell table:style-name="ce17" office:value-type="string" calcext:value-type="string">
            <text:p>Natural gelling agent from citrus peel and apple pomace. Food additive. Bioplastic binder.</text:p>
          </table:table-cell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ioplastic film, paper size, food gel, adhesive, bioplastic composit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Wheat Gluten Bioplastic</text:p>
          </table:table-cell>
          <table:table-cell office:value-type="string" calcext:value-type="string">
            <text:p>Strong bioplastic from wheat gluten protein. Interesting mechanical properties, earthy color.</text:p>
          </table:table-cell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Bioplastic casting, film, structural biopolymer research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Casting</text:p>
          </table:table-cell>
          <table:table-cell table:style-name="ce15" office:value-type="string" calcext:value-type="string">
            <text:p>Chocolat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Food casting, sculpture, mold filling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Casting</text:p>
          </table:table-cell>
          <table:table-cell office:value-type="string" calcext:value-type="string">
            <text:p>Isomalt Sugar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Sugar casting, transparent casting, food sculptur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Casting</text:p>
          </table:table-cell>
          <table:table-cell table:style-name="ce15" office:value-type="string" calcext:value-type="string">
            <text:p>Sugar Glas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reakaway props, transparent casting, food sculptur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Baking Soda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hemical process, cleaning, bioplastic pH adjustment, casting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Cream of Tartar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Bioplastic additive, food casting, mordant aid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Ferric Sulfate (Rusty Nail Water)</text:p>
          </table:table-cell>
          <table:table-cell office:value-type="string" calcext:value-type="string">
            <text:p>Iron acetate solution made from steel wool or rusty nails in vinegar. Mordant modifier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Iron mordant for natural dyeing — darkens and saddens colors, shifts yellows to green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Salt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reservative, mordant aid, chemical process, textur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Vinegar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pH adjustment, bioplastic process, cleaning, mordant aid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Food</text:p>
          </table:table-cell>
          <table:table-cell table:style-name="ce15" office:value-type="string" calcext:value-type="string">
            <text:p>Gourd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Natural vessel, mold, instrument body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Starch source for bioplastic, adhesive, block printing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Eggshell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lcium carbonate filler, texture, mosaic, Mosaic, pigment filler, gesso additive, calcium carbonate source, garden amendment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Castor Oil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Plasticizer for bioplastics, lubricant, soap additiv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Oil</text:p>
          </table:table-cell>
          <table:table-cell table:style-name="ce15" office:value-type="string" calcext:value-type="string">
            <text:p>Coconut Oi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Mold release, bioplastic plasticizer, finish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Fractionated Coconut Oil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Stable plasticizer, mold release, skin-saf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Oil</text:p>
          </table:table-cell>
          <table:table-cell table:style-name="ce15" office:value-type="string" calcext:value-type="string">
            <text:p>Jojoba Oil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Lubricant, skin-safe release agent, wax-like at room temperatur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live Oil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Mold release, soap-making, skin-safe lubricant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Oil</text:p>
          </table:table-cell>
          <table:table-cell table:style-name="ce15" office:value-type="string" calcext:value-type="string">
            <text:p>Vegetable Oi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Mold release, bioplastic additive, finish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Avocado Skin and Pit</text:p>
          </table:table-cell>
          <table:table-cell office:value-type="string" calcext:value-type="string">
            <text:p>Produces warm salmon-pink. No mordant needed. Substantive dye. Better lightfastness than beet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Natural pink-peach dye for textiles and paper, mordant-fre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Beet Powder (Fugitive)</text:p>
          </table:table-cell>
          <table:table-cell table:style-name="ce17" office:value-type="string" calcext:value-type="string">
            <text:p>Dried and ground beet. Vivid magenta-pink. Very fugitive — fades rapidly in light. Good for demonstrations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Natural pink-red pigment, food coloring, temporary textile dye, anthotype photography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Intense golden yellow from dried stigmas. Very lightfast for a plant pigment. Traditional illumination pigment.</text:p>
          </table:table-cell>
          <table:table-cell office:value-type="string" calcext:value-type="string">
            <text:p>$$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Natural gold-yellow pigment, illumination, ink, food coloring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Spirulina Powder</text:p>
          </table:table-cell>
          <table:table-cell table:style-name="ce17" office:value-type="string" calcext:value-type="string">
            <text:p>Blue-green algae pigment. Vivid blue-green. Fugitive. Used for anthotype photography and natural paint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Natural blue-green pigment, anthotype photography, food coloring, paint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Turmeric (Fugitive Pigment)</text:p>
          </table:table-cell>
          <table:table-cell office:value-type="string" calcext:value-type="string">
            <text:p>Curcumin pigment. Vivid orange-yellow. No mordant needed. Highly fugitive but brilliant for demonstrations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Natural yellow pigment, fabric dye, anthotype photography, food coloring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Preservative</text:p>
          </table:table-cell>
          <table:table-cell table:style-name="ce15" office:value-type="string" calcext:value-type="string">
            <text:p>Clove Oil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Preservative, biocide for organic materials, oil paint retarder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Tea Tree Oil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Mild preservative and biocide for organic stored materials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Starch</text:p>
          </table:table-cell>
          <table:table-cell table:style-name="ce15" office:value-type="string" calcext:value-type="string">
            <text:p>Arrowroot Starch</text:p>
          </table:table-cell>
          <table:table-cell table:style-name="ce17" office:value-type="string" calcext:value-type="string">
            <text:p>Bioplastic source. Very fine. Substitute for cornstarch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Bioplastic, adhesiv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assava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Starch source for bioplastic, adhesive, food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Starch</text:p>
          </table:table-cell>
          <table:table-cell table:style-name="ce15" office:value-type="string" calcext:value-type="string">
            <text:p>Ric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Starch source, rice paper, casting, food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Tapioca / Cassava Starch</text:p>
          </table:table-cell>
          <table:table-cell office:value-type="string" calcext:value-type="string">
            <text:p>Bioplastic source. Clearer film than cornstarch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Bioplastic, adhesive, food casting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style-name="ce13" office:value-type="string" calcext:value-type="string">
            <text:p>Sugar</text:p>
          </table:table-cell>
          <table:table-cell table:style-name="ce15" office:value-type="string" calcext:value-type="string">
            <text:p>Glucos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Sugar casting, bioplastic additive</text:p>
          </table:table-cell>
          <table:table-cell table:number-columns-repeated="16368"/>
        </table:table-row>
        <table:table-row table:style-name="ro5">
          <table:table-cell table:style-name="ce9" office:value-type="string" calcext:value-type="string">
            <text:p>Grocery</text:p>
          </table:table-cell>
          <table:table-cell table:number-columns-repeated="2" office:value-type="string" calcext:value-type="string">
            <text:p>Sugar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Sugar glass casting, food sculpture, bioplastic</text:p>
          </table:table-cell>
          <table:table-cell table:number-columns-repeated="16368"/>
        </table:table-row>
        <table:table-row table:style-name="ro4">
          <table:table-cell table:style-name="ce10" office:value-type="string" calcext:value-type="string" table:number-columns-spanned="16" table:number-rows-spanned="1">
            <text:p>INDUSTRIAL</text:p>
          </table:table-cell>
          <table:covered-table-cell table:number-columns-repeated="15" table:style-name="Default"/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Bone Glue / Hide Glu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Joinery adhesive, gesso binder, instrument mak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CA glu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Fast adhesive, gap filling with baking soda, wood repai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Contact Cement</text:p>
          </table:table-cell>
          <table:table-cell/>
          <table:table-cell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25" office:value-type="string" calcext:value-type="string">
            <text:p>Flammabl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ermanent flexible bonding — solvent-based, flammabl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Fish Glu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Conservation adhesive, gilding size, flexible bond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Methylcellulose</text:p>
          </table:table-cell>
          <table:table-cell office:value-type="string" calcext:value-type="string">
            <text:p>Wallpaper paste, bookbinding, bioplastic additive. Very safe, no VOCs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Bookbinding, papier-mache, bioplastic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Oogoo (Silicone Caulk + Cornstarch)</text:p>
          </table:table-cell>
          <table:table-cell table:style-name="ce17" office:value-type="string" calcext:value-type="string">
            <text:p>Hardware store silicone caulk + cornstarch filler/accelerator. DIY flexible rubber compound. Tin-cure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Flexible casting, DIY rubber, grip coating, mold liner, gap fill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PUR</text:p>
          </table:table-cell>
          <table:table-cell/>
          <table:table-cell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tructural adhesive, gap filling, construction joinery — moisture-activated, expand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PVA Glu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Adhesive, binder, sealant, paper mache, bookbind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Pros-Aide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Prosthetic adhesive — skin-safe, waterproof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Rice Starch Paste</text:p>
          </table:table-cell>
          <table:table-cell table:style-name="ce17" office:value-type="string" calcext:value-type="string">
            <text:p>Finer than wheat paste. Traditional East Asian bookbinding. Archival, reversible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ookbinding, conservation repair, Japanese paper work, fine lamina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Shoe Goo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lexible adhesive and sealant for rubber and fabric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Spray Adhesiv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Temporary and permanent lamination, fabric bond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Tylose Powder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Binder for modelling pastes, tile adhesive additiv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dhesive</text:p>
          </table:table-cell>
          <table:table-cell table:style-name="ce15" office:value-type="string" calcext:value-type="string">
            <text:p>Wheat Starch Paste</text:p>
          </table:table-cell>
          <table:table-cell table:style-name="ce17" office:value-type="string" calcext:value-type="string">
            <text:p>Cooked wheat starch adhesive. Archival, fully reversible with moisture. Traditional Japanese bookbinding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ookbinding, paper conservation, papier-mache, paste paper decoration, moun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rmature</text:p>
          </table:table-cell>
          <table:table-cell office:value-type="string" calcext:value-type="string">
            <text:p>Aluminum Armature Wire (Annealed)</text:p>
          </table:table-cell>
          <table:table-cell office:value-type="string" calcext:value-type="string">
            <text:p>Soft annealed aluminum wire for sculpture and stop motion armature. Holds position without springing back.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culpture armature, stop motion puppet skeleton, jewellery wire work, poseable structure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rmature</text:p>
          </table:table-cell>
          <table:table-cell table:style-name="ce15" office:value-type="string" calcext:value-type="string">
            <text:p>Chicken Wir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Armature for papier-mache and plaster, sculptural struc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Armature</text:p>
          </table:table-cell>
          <table:table-cell office:value-type="string" calcext:value-type="string">
            <text:p>Hardware Cloth (Welded Wire Mesh)</text:p>
          </table:table-cell>
          <table:table-cell office:value-type="string" calcext:value-type="string">
            <text:p>Square-grid welded steel mesh. Stiffer and flatter than chicken wire. Rigid armature and structural panels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Rigid armature, sifting screens, concrete reinforcement, small enclosures, plaster lath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Armature</text:p>
          </table:table-cell>
          <table:table-cell table:style-name="ce15" office:value-type="string" calcext:value-type="string">
            <text:p>Rebar / Steel Rod</text:p>
          </table:table-cell>
          <table:table-cell table:style-name="ce17" office:value-type="string" calcext:value-type="string">
            <text:p>Deformed steel rod for concrete reinforcement. Internal armature for large sculpture and outdoor structures.</text:p>
          </table:table-cell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tructural armature, concrete reinforcement, ground anchoring, large prop spine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Bioplastic</text:p>
          </table:table-cell>
          <table:table-cell office:value-type="string" calcext:value-type="string">
            <text:p>PHA</text:p>
          </table:table-cell>
          <table:table-cell/>
          <table:table-cell office:value-type="string" calcext:value-type="string">
            <text:p>$$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Biodegradable bioplastic — marine compostabl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Bioplastic</text:p>
          </table:table-cell>
          <table:table-cell table:style-name="ce15" office:value-type="string" calcext:value-type="string">
            <text:p>Sodium Alginate Yarn</text:p>
          </table:table-cell>
          <table:table-cell table:style-name="ce17" office:value-type="string" calcext:value-type="string">
            <text:p>Extruded sodium alginate crosslinked with calcium chloride. DIY bio yarn. Compostable, not water-stable.</text:p>
          </table:table-cell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Bio yarn, textile experiment, educational chemistry — ionic crosslinking demonstra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Binders Board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Bookbinding, hard cover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Board</text:p>
          </table:table-cell>
          <table:table-cell table:style-name="ce15" office:value-type="string" calcext:value-type="string">
            <text:p>Book Board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Bookbinding, hard cover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hip Board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Bookbinding, packaging, lightweight struc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Board</text:p>
          </table:table-cell>
          <table:table-cell table:style-name="ce15" office:value-type="string" calcext:value-type="string">
            <text:p>Gray Board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Bookbinding, packaging, model mak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Museum Board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Conservation matting, archival moun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arbon</text:p>
          </table:table-cell>
          <table:table-cell table:style-name="ce15" office:value-type="string" calcext:value-type="string">
            <text:p>Activated Charcoa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Water filtration, soil amendment, biocha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asting</text:p>
          </table:table-cell>
          <table:table-cell office:value-type="string" calcext:value-type="string">
            <text:p>Green Sand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Metal casting mold — traditional foundry, reusable, water-bonded sand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asting</text:p>
          </table:table-cell>
          <table:table-cell table:style-name="ce15" office:value-type="string" calcext:value-type="string">
            <text:p>Oil Sand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and casting, metal casting mold, modelling — petrobond typ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ellulose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tructure, joinery, weaving, pulp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ellulose</text:p>
          </table:table-cell>
          <table:table-cell table:style-name="ce15" office:value-type="string" calcext:value-type="string">
            <text:p>Cork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Insulation, lightweight armature, surface texture, stamp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ellulose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tructure, joinery, carving, armature, cas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ement</text:p>
          </table:table-cell>
          <table:table-cell table:style-name="ce15" office:value-type="string" calcext:value-type="string">
            <text:p>Aircrete (Foam Concrete)</text:p>
          </table:table-cell>
          <table:table-cell table:style-name="ce17" office:value-type="string" calcext:value-type="string">
            <text:p>Portland cement + foaming agent. Very lightweight concrete. Thermal insulation, large-scale casting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Lightweight casting, insulating blocks, large-scale set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onstruction, casting, sculpture, furni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ement</text:p>
          </table:table-cell>
          <table:table-cell table:style-name="ce15" office:value-type="string" calcext:value-type="string">
            <text:p>Ferrocement</text:p>
          </table:table-cell>
          <table:table-cell table:style-name="ce17" office:value-type="string" calcext:value-type="string">
            <text:p>Thin cement layer reinforced with wire mesh. Very strong, lightweight. Traditional boat and tank building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culptural construction, water features, tanks, large-scale outdoor structure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Hypertufa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Lightweight cast planters and garden objec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ement</text:p>
          </table:table-cell>
          <table:table-cell table:style-name="ce15" office:value-type="string" calcext:value-type="string">
            <text:p>Jesmonite AC100</text:p>
          </table:table-cell>
          <table:table-cell table:style-name="ce17" office:value-type="string" calcext:value-type="string">
            <text:p>Water-based acrylic/gypsum composite. Low toxicity, professional finish. Essentially commercial polymer-modified gypsum.</text:p>
          </table:table-cell>
          <table:table-cell table:style-name="ce19"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sting, sculpture, props, architectural elements, decorative objec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Portland Cement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oncrete, mortar, casting,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Borax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Flux, fire retardant, slime activator, cleaning, preservativ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Boric Acid</text:p>
          </table:table-cell>
          <table:table-cell office:value-type="string" calcext:value-type="string">
            <text:p>Flame retardant for cellulose. Mild fungicide. Low toxicity.</text:p>
          </table:table-cell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lame retardant, fungicide, preservativ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Cationic Polyacrylamide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Paper formation aid — do not use near waterway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lorine Bleach</text:p>
          </table:table-cell>
          <table:table-cell/>
          <table:table-cell office:value-type="string" calcext:value-type="string">
            <text:p>$</text:p>
          </table:table-cell>
          <table:table-cell table:style-name="ce22" office:value-type="string" calcext:value-type="string">
            <text:p>3 — High</text:p>
          </table:table-cell>
          <table:table-cell table:style-name="ce31" office:value-type="string" calcext:value-type="string">
            <text:p>Reactiv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Disinfectant, whitening — produces toxic fumes when mixed with acids or ammonia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Copper Sulfate</text:p>
          </table:table-cell>
          <table:table-cell table:style-name="ce17" office:value-type="string" calcext:value-type="string">
            <text:p>Electroforming, mordant, patina agent. Toxic.</text:p>
          </table:table-cell>
          <table:table-cell table:style-name="ce19"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Electroforming, mordant, patina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Ferric Ammonium Citrate</text:p>
          </table:table-cell>
          <table:table-cell office:value-type="string" calcext:value-type="string">
            <text:p>Cyanotype and kallitype sensitizer. Substantially non-toxic iron salt. Light-sensitive.</text:p>
          </table:table-cell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Alternative photography — cyanotype, Van Dyke brown, kallityp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Lime(Calcium Hydroxide)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2" office:value-type="string" calcext:value-type="string">
            <text:p>3 — High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laster, whitewash, mordant, caustic — handle with ca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Lye</text:p>
          </table:table-cell>
          <table:table-cell/>
          <table:table-cell office:value-type="string" calcext:value-type="string">
            <text:p>$</text:p>
          </table:table-cell>
          <table:table-cell table:style-name="ce23" office:value-type="string" calcext:value-type="string">
            <text:p>4 — Caution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oap-making, lye solution for mordant, wood treatment — highly caustic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Oxalic Acid</text:p>
          </table:table-cell>
          <table:table-cell table:style-name="ce17" office:value-type="string" calcext:value-type="string">
            <text:p>Wood bleaching, rust removal, mordant aid. Toxic dust.</text:p>
          </table:table-cell>
          <table:table-cell table:style-name="ce19"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Wood bleaching, rust removal, dye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otassium Dichromate</text:p>
          </table:table-cell>
          <table:table-cell office:value-type="string" calcext:value-type="string">
            <text:p>Gum bichromate and dichromate printing sensitizer. Highly toxic, carcinogenic. Adult-supervised only.</text:p>
          </table:table-cell>
          <table:table-cell office:value-type="string" calcext:value-type="string">
            <text:p>$$</text:p>
          </table:table-cell>
          <table:table-cell table:style-name="ce23" office:value-type="string" calcext:value-type="string">
            <text:p>4 — Caution</text:p>
          </table:table-cell>
          <table:table-cell table:style-name="ce32" office:value-type="string" calcext:value-type="string">
            <text:p>Carcinoge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Gum bichromate photographic process — sensitiz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Potassium Ferricyanide</text:p>
          </table:table-cell>
          <table:table-cell table:style-name="ce17" office:value-type="string" calcext:value-type="string">
            <text:p>Cyanotype sensitizer. Not the same as cyanide — stable, safe under normal use. Produces Prussian blue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31" office:value-type="string" calcext:value-type="string">
            <text:p>Reactiv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Alternative photography — cyanotype sensitiz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Quicklime</text:p>
          </table:table-cell>
          <table:table-cell/>
          <table:table-cell office:value-type="string" calcext:value-type="string">
            <text:p>$</text:p>
          </table:table-cell>
          <table:table-cell table:style-name="ce23" office:value-type="string" calcext:value-type="string">
            <text:p>4 — Caution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Lime plaster source — highly caustic, exothermic with wat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Silver Nitrate</text:p>
          </table:table-cell>
          <table:table-cell table:style-name="ce17" office:value-type="string" calcext:value-type="string">
            <text:p>Photographic sensitizer. Caustic — causes permanent black skin staining. Core of Van Dyke and salted paper.</text:p>
          </table:table-cell>
          <table:table-cell table:style-name="ce19" office:value-type="string" calcext:value-type="string">
            <text:p>$$$</text:p>
          </table:table-cell>
          <table:table-cell table:style-name="ce22" office:value-type="string" calcext:value-type="string">
            <text:p>3 — High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Alternative photography — Van Dyke brown, salted paper, kallitype, silver processe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Soda Ash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Dye fixative for fiber reactive dyes, pH adjustment, clean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Sodium Percarbonat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Oxygen bleach, dye fixative, clean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Sodium Thiosulfate (Hypo)</text:p>
          </table:table-cell>
          <table:table-cell office:value-type="string" calcext:value-type="string">
            <text:p>Photographic fixer. Dissolves unexposed silver salts. Non-toxic at working concentrations.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Alternative photography fixer, gold and selenium toning bath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lay</text:p>
          </table:table-cell>
          <table:table-cell table:style-name="ce15" office:value-type="string" calcext:value-type="string">
            <text:p>Grog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lay additive for strength and texture, refractory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Roma Plastilina / Sulfur-Free Oil Clay</text:p>
          </table:table-cell>
          <table:table-cell office:value-type="string" calcext:value-type="string">
            <text:p>Non-drying oil-based sculpting clay. Sulfur-free — platinum silicone compatible. Non-hardening, fully reusable.</text:p>
          </table:table-cell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culpting masters for mold-making, stop motion prototyping, industrial desig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Composite</text:p>
          </table:table-cell>
          <table:table-cell table:style-name="ce15" office:value-type="string" calcext:value-type="string">
            <text:p>Fiberglass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tructural lamination, mold-making, composite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luminum Foil Tap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onductive traces, heat shielding, duct seal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Batterie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Power source for circuits, electronics projec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onductive Dough (Salt)</text:p>
          </table:table-cell>
          <table:table-cell office:value-type="string" calcext:value-type="string">
            <text:p>Flour + salt + water + cream of tartar. Conducts through ionic movement. Educational circuits standard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office:value-type="string" calcext:value-type="string">
            <text:p>Educational circuits, soft electronics demonstration, sculptable conducto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Conductive Fabric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Wearable electronics, EMI shielding, soft circui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onductive Paint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Conductive traces, sensor making, circuit repai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Conductive velcro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onnectors for wearable electronics, soft circui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opper Tape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onductive traces, paper circuits, EMI shield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Electrical Metallic Tubing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onduit, structural armature, bend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ichrome Wire</text:p>
          </table:table-cell>
          <table:table-cell office:value-type="string" calcext:value-type="string">
            <text:p>Nickel-chromium resistance wire. Used in hot wire foam cutters and heating elements.</text:p>
          </table:table-cell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Hot wire foam cutting, heating elements, resistance wire application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Electronics</text:p>
          </table:table-cell>
          <table:table-cell table:style-name="ce15" office:value-type="string" calcext:value-type="string">
            <text:p>Resistive Dough (Sugar)</text:p>
          </table:table-cell>
          <table:table-cell table:style-name="ce17" office:value-type="string" calcext:value-type="string">
            <text:p>Flour + sugar + vegetable oil. Non-conductive. Insulating companion to salt dough in educational circuits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&lt; 1 Year</text:p>
          </table:table-cell>
          <table:table-cell table:style-name="ce13" office:value-type="string" calcext:value-type="string">
            <text:p>Educational circuits — insulating element, prevents short circuits with conductive dough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Velostat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ressure-sensitive resistive material for soft sensor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abric</text:p>
          </table:table-cell>
          <table:table-cell table:style-name="ce15" office:value-type="string" calcext:value-type="string">
            <text:p>Fleec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Insulation, padding, soft sculpture, wearable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usable Interfac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Garment stiffening, bookbinding, appliqu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abric</text:p>
          </table:table-cell>
          <table:table-cell table:style-name="ce15" office:value-type="string" calcext:value-type="string">
            <text:p>Polyester Fabric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Fabric, reinforcement, fusible bas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Brass Fastener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aper fastening, bookbinding, hardwa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astener</text:p>
          </table:table-cell>
          <table:table-cell table:style-name="ce15" office:value-type="string" calcext:value-type="string">
            <text:p>Rivet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ermanent mechanical fastening, leatherwork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taples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Mechanical fastening, bookbinding,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Abaca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Papermaking, rope, fiber reinforcemen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Cotton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Fiber reinforcement, fabric, paper, padd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Dacron / Polyester Batting</text:p>
          </table:table-cell>
          <table:table-cell table:style-name="ce17" office:value-type="string" calcext:value-type="string">
            <text:p>Bonded polyester fiber batting. Wraps over foam to soften edges and add surface comfort layer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Upholstery batting, quilting, padding, soft sculpture fill, puppet bodie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Flax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Linen fiber, linseed oil source, papermak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Fosshape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Thermoplastic felt — heat-formed hats, masks, armo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Hemp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Fiber reinforcement, papermaking, rope, fabric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Polyurethane Foam — High Density</text:p>
          </table:table-cell>
          <table:table-cell table:style-name="ce17" office:value-type="string" calcext:value-type="string">
            <text:p>Flexible PU foam for seating. Spec by density (PCF) and firmness (ILD). Not petroleum-free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Upholstery seating, props, stage padding, armature buildup, impact prote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Tyvek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Weatherproof surface, bookbinding, envelopes, protective cloth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iber</text:p>
          </table:table-cell>
          <table:table-cell table:style-name="ce15" office:value-type="string" calcext:value-type="string">
            <text:p>Woo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7" office:value-type="string" calcext:value-type="string">
            <text:p>Biological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Felting, weaving, insulation, fiber reinforcemen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BOPET film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tencil material, heat-resistant film, packag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ilm</text:p>
          </table:table-cell>
          <table:table-cell table:style-name="ce15" office:value-type="string" calcext:value-type="string">
            <text:p>Mylar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tencil material, reflective surface, film, templat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Articulated Foam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lexible armor and costume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oam</text:p>
          </table:table-cell>
          <table:table-cell table:style-name="ce15" office:value-type="string" calcext:value-type="string">
            <text:p>Cushion Foam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Upholstery, seating, packaging, prop padd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EVA Foa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Armor, props, cosplay, padding, lightweight struc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Foam</text:p>
          </table:table-cell>
          <table:table-cell table:style-name="ce15" office:value-type="string" calcext:value-type="string">
            <text:p>Expanding Foam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31" office:value-type="string" calcext:value-type="string">
            <text:p>Reactiv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Void filling, lightweight armature, insula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Foam Rubber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adding, puppet-making, props, soft sculp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Lubricant</text:p>
          </table:table-cell>
          <table:table-cell table:style-name="ce15" office:value-type="string" calcext:value-type="string">
            <text:p>Mineral Oil/Baby Oil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old release, lubricant, skin barri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luminum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asting, sheet, structural — higher temp than low-temp alloy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etal</text:p>
          </table:table-cell>
          <table:table-cell table:style-name="ce15" office:value-type="string" calcext:value-type="string">
            <text:p>Bismuth</text:p>
          </table:table-cell>
          <table:table-cell table:style-name="ce17"/>
          <table:table-cell table:style-name="ce19" office:value-type="string" calcext:value-type="string">
            <text:p>$$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Very low melting point casting alloy componen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pper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Electroforming, casting, conductive traces, patina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etal</text:p>
          </table:table-cell>
          <table:table-cell table:style-name="ce15" office:value-type="string" calcext:value-type="string">
            <text:p>Pewter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Low-temp metal casting — tin alloy, lead-free modern version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tructural, armature, casting — high temp proces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etal</text:p>
          </table:table-cell>
          <table:table-cell table:style-name="ce15" office:value-type="string" calcext:value-type="string">
            <text:p>Tin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Low-temp casting, soldering, pla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oods/Field Metal</text:p>
          </table:table-cell>
          <table:table-cell/>
          <table:table-cell office:value-type="string" calcext:value-type="string">
            <text:p>$$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Low-temp casting alloy — bismuth, tin, indium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Aluminum Powder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etallic pigment, resin filler, cold metal cas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Bentonite Clay</text:p>
          </table:table-cell>
          <table:table-cell office:value-type="string" calcext:value-type="string">
            <text:p>Swells with water. Sand casting binder, slip stabilizer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and casting binder, slip stabilizer, seal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Bronze Powder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etallic pigment, resin filler, cold bronze effec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alcium Carbonat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iller, pH adjustment, bioplastic additive, whi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Fumed Silica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Thickener for resins and silicone, matting agent — fine dust hazard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Iron Powder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atina effects, metal-filled resin, magnetic additiv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Kaolin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lay additive, paper coating, cosmetics, glaz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Perlit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Lightweight aggregate for hypertufa and concrete, insula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Sand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sting, aggregate for concrete and plaster, abrasive, tex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and+Sodium Silicate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and casting, core mak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Mineral</text:p>
          </table:table-cell>
          <table:table-cell table:style-name="ce15" office:value-type="string" calcext:value-type="string">
            <text:p>Whiting / Precipitated Chalk</text:p>
          </table:table-cell>
          <table:table-cell table:style-name="ce17" office:value-type="string" calcext:value-type="string">
            <text:p>Paint extender, primer base, putty filler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aint extender, gesso, putty, fill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Linseed Oil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Wood finish, paint binder, putty, rust inhibito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Oil</text:p>
          </table:table-cell>
          <table:table-cell table:style-name="ce15" office:value-type="string" calcext:value-type="string">
            <text:p>Stand Oil</text:p>
          </table:table-cell>
          <table:table-cell table:style-name="ce17" office:value-type="string" calcext:value-type="string">
            <text:p>Heat-polymerized linseed oil. Thick, slow-drying, self-levelling. Less yellowing than raw. Traditional glazing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Oil painting medium, glazing, transparent layers, wood finish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Sun-Thickened Linseed Oil</text:p>
          </table:table-cell>
          <table:table-cell office:value-type="string" calcext:value-type="string">
            <text:p>Linseed oil partially polymerized by exposure to sunlight in a shallow dish. Traditional, DIY-makeable.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Oil painting medium, glazing medium, traditional Renaissance techniqu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Oil</text:p>
          </table:table-cell>
          <table:table-cell table:style-name="ce15" office:value-type="string" calcext:value-type="string">
            <text:p>Tung Oil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Hard-drying penetrating wood finish — highly durabl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Alcohol Activated Makeup</text:p>
          </table:table-cell>
          <table:table-cell/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Prosthetic and body paint — alcohol-activated, waterproof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aint</text:p>
          </table:table-cell>
          <table:table-cell table:style-name="ce15" office:value-type="string" calcext:value-type="string">
            <text:p>Enamel Paint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Hard surface finish, model making, signag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AX paint</text:p>
          </table:table-cell>
          <table:table-cell/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Prosthetic and skin-safe paint — Pros-Aide and acrylic mix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aint</text:p>
          </table:table-cell>
          <table:table-cell table:style-name="ce15" office:value-type="string" calcext:value-type="string">
            <text:p>Psycho Paint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Flexible paint for foam and latex — Pros-Aide and pigmen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Scenic Paint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Large-scale theatrical and scenic pain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aint</text:p>
          </table:table-cell>
          <table:table-cell table:style-name="ce15" office:value-type="string" calcext:value-type="string">
            <text:p>Spray Paint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urface finish, color, weathering effec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Carbon Black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Pigment, conductive additive, rubber reinforcemen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Manganese Dioxid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igment, ceramic colorant, glaze additiv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Manganese Oxide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Brown-black pigment, ceramic coloran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igment</text:p>
          </table:table-cell>
          <table:table-cell table:style-name="ce15" office:value-type="string" calcext:value-type="string">
            <text:p>Synthetic Pigment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olor for paint, resin, clay — varies by specific pigment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Dental Plaster</text:p>
          </table:table-cell>
          <table:table-cell office:value-type="string" calcext:value-type="string">
            <text:p>Extreme detail</text:p>
          </table:table-cell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High-detail casting, dental prosthetics, fine mold-making, sculp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er</text:p>
          </table:table-cell>
          <table:table-cell table:style-name="ce15" office:value-type="string" calcext:value-type="string">
            <text:p>Earthen Plaster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Interior wall finish, natural building, sculp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Hydrocal</text:p>
          </table:table-cell>
          <table:table-cell office:value-type="string" calcext:value-type="string">
            <text:p>Harder than plaster less porous than PoP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Mold-making, casting, theatrical props, harder than plaster of Pari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er</text:p>
          </table:table-cell>
          <table:table-cell table:style-name="ce15" office:value-type="string" calcext:value-type="string">
            <text:p>Plaster of Paris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old-making, casting, sculpture, construction, surface repair, slip cas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Polymer Modified Gypsum</text:p>
          </table:table-cell>
          <table:table-cell/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High-strength plaster casting, dental, industrial mold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er</text:p>
          </table:table-cell>
          <table:table-cell table:style-name="ce15" office:value-type="string" calcext:value-type="string">
            <text:p>Ultracal 30</text:p>
          </table:table-cell>
          <table:table-cell table:style-name="ce17" office:value-type="string" calcext:value-type="string">
            <text:p>Harder industry standard</text:p>
          </table:table-cell>
          <table:table-cell table:style-name="ce19"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 table:style-name="ce26" office:value-type="string" calcext:value-type="string">
            <text:p>Inhal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Industrial mold-making, high-detail casting, foam latex molds, professional standard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DM 3D printing, structural parts, vapor smooth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Acrylic Coating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Sealing, surface protection, weatherproof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poxy Resin</text:p>
          </table:table-cell>
          <table:table-cell/>
          <table:table-cell office:value-type="string" calcext:value-type="string">
            <text:p>$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asting, lamination, adhesive, coa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Foam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Armature, padding, lightweight structure, textur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Recycled casting, sheet material, container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High Temp Resin</text:p>
          </table:table-cell>
          <table:table-cell table:style-name="ce17"/>
          <table:table-cell table:style-name="ce19" office:value-type="string" calcext:value-type="string">
            <text:p>$$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High-temperature casting, tool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P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ilm, bags, flexible sheet, recycled cas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Linoleum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Block printing, flooring, surface material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Nylon</text:p>
          </table:table-cell>
          <table:table-cell/>
          <table:table-cell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DM 3D printing, gears, structural parts, fabric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PETG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FDM 3D printing, food-safe applications, transparent par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FDM 3D printing, packaging, disposable item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PP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FDM 3D printing, living hinges, food container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oam, clear packaging, lost-foam cas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Platisol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PVC plastisol — casting, screen printing, dip coa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olycarbonate</text:p>
          </table:table-cell>
          <table:table-cell/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DM 3D printing, transparent structural parts, safety glaz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Polyester Resin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sting, fiberglass lamination, structural par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UV Resin</text:p>
          </table:table-cell>
          <table:table-cell/>
          <table:table-cell office:value-type="string" calcext:value-type="string">
            <text:p>$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ine casting, coating, electronics encapsula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Plastic</text:p>
          </table:table-cell>
          <table:table-cell table:style-name="ce15" office:value-type="string" calcext:value-type="string">
            <text:p>Urethane Resin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Casting, props, foam, flexible par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Epoxy Tooling Board</text:p>
          </table:table-cell>
          <table:table-cell office:value-type="string" calcext:value-type="string">
            <text:p>Machinable rigid foam board. CNC-friendly mold master material for vacuum forming and injection molding.</text:p>
          </table:table-cell>
          <table:table-cell office:value-type="string" calcext:value-type="string">
            <text:p>$$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CNC mold masters, vacuum forming tools, set construction tool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Rubber</text:p>
          </table:table-cell>
          <table:table-cell table:style-name="ce15" office:value-type="string" calcext:value-type="string">
            <text:p>Natural Rubber Latex</text:p>
          </table:table-cell>
          <table:table-cell table:style-name="ce17" office:value-type="string" calcext:value-type="string">
            <text:p>Pourable, flexible when cured, fully natural. Traditional mold and flexible casting material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Mold-making, casting, flexible parts, printing stamps, glove mold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number-columns-repeated="2" office:value-type="string" calcext:value-type="string">
            <text:p>Rubber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Mold-making, printing stamps, flexible part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Rubber</text:p>
          </table:table-cell>
          <table:table-cell table:style-name="ce15" office:value-type="string" calcext:value-type="string">
            <text:p>Slush Latex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Hollow latex casting, mask-making, prop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ealant</text:p>
          </table:table-cell>
          <table:table-cell office:value-type="string" calcext:value-type="string">
            <text:p>Water glass (sodium silicate)</text:p>
          </table:table-cell>
          <table:table-cell office:value-type="string" calcext:value-type="string">
            <text:p>May seal concrete/plaster make non-pourus.</text:p>
          </table:table-cell>
          <table:table-cell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ealing, Adhesive, Binder, Deflocculate, Egg preservation.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heet</text:p>
          </table:table-cell>
          <table:table-cell table:style-name="ce15" office:value-type="string" calcext:value-type="string">
            <text:p>Acrylic Sheet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Transparent structural panel, laser cutting, engrav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Cellulose Acetate</text:p>
          </table:table-cell>
          <table:table-cell/>
          <table:table-cell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Transparent sheet, film, frames — acetone solubl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heet</text:p>
          </table:table-cell>
          <table:table-cell table:style-name="ce15" office:value-type="string" calcext:value-type="string">
            <text:p>Polycarbonate Sheet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Impact-resistant transparent panel, glaz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ilicone</text:p>
          </table:table-cell>
          <table:table-cell office:value-type="string" calcext:value-type="string">
            <text:p>Clear Silicone Sheet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Flexible transparent sheet, gasket, mold lin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ilicone</text:p>
          </table:table-cell>
          <table:table-cell table:style-name="ce15" office:value-type="string" calcext:value-type="string">
            <text:p>Platinum Cure Silicone</text:p>
          </table:table-cell>
          <table:table-cell table:style-name="ce17"/>
          <table:table-cell table:style-name="ce19" office:value-type="string" calcext:value-type="string">
            <text:p>$$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Food-safe mold-making, prosthetics, high-detail cast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ilicone</text:p>
          </table:table-cell>
          <table:table-cell office:value-type="string" calcext:value-type="string">
            <text:p>Silicone Caulk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ealing, flexible mold material, gap fill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ilicone</text:p>
          </table:table-cell>
          <table:table-cell table:style-name="ce15" office:value-type="string" calcext:value-type="string">
            <text:p>Tin Cure Silicone</text:p>
          </table:table-cell>
          <table:table-cell table:style-name="ce17"/>
          <table:table-cell table:style-name="ce19" office:value-type="string" calcext:value-type="string">
            <text:p>$$$</text:p>
          </table:table-cell>
          <table:table-cell table:style-name="ce21" office:value-type="string" calcext:value-type="string">
            <text:p>2 — Med</text:p>
          </table:table-cell>
          <table:table-cell table:style-name="ce28" office:value-type="string" calcext:value-type="string">
            <text:p>Irrit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old-making, casting — inhibited by sulfur and latex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number-columns-repeated="2" office:value-type="string" calcext:value-type="string">
            <text:p>Soap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 table:style-name="ce28" office:value-type="string" calcext:value-type="string">
            <text:p>Irritant</text:p>
          </table:table-cell>
          <table:table-cell table:number-columns-repeated="3" table:style-name="ce35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33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Mold release, surface treatment, lubricant, clean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olvent</text:p>
          </table:table-cell>
          <table:table-cell table:style-name="ce15" office:value-type="string" calcext:value-type="string">
            <text:p>Acetone</text:p>
          </table:table-cell>
          <table:table-cell table:style-name="ce17"/>
          <table:table-cell table:style-name="ce19" office:value-type="string" calcext:value-type="string">
            <text:p>$</text:p>
          </table:table-cell>
          <table:table-cell table:style-name="ce22" office:value-type="string" calcext:value-type="string">
            <text:p>3 — High</text:p>
          </table:table-cell>
          <table:table-cell table:style-name="ce25" office:value-type="string" calcext:value-type="string">
            <text:p>Flammabl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Solvent for ABS, cleaning resin tools, nail polish remov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D-Limonene / Citrus Solvent</text:p>
          </table:table-cell>
          <table:table-cell office:value-type="string" calcext:value-type="string">
            <text:p>Terpene solvent from citrus peel. Dissolves EPS/polystyrene. Bio-based but NOT non-toxic — respiratory sensitizer.</text:p>
          </table:table-cell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table:style-name="ce3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Dissolves EPS foam, solvent for oils and adhesives, degreaser, natural citrus clean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olvent</text:p>
          </table:table-cell>
          <table:table-cell table:style-name="ce15" office:value-type="string" calcext:value-type="string">
            <text:p>Denatured Alcohol (Methylated Spirits)</text:p>
          </table:table-cell>
          <table:table-cell table:style-name="ce17" office:value-type="string" calcext:value-type="string">
            <text:p>Ethanol with toxic denaturants (methanol). Primary solvent for shellac. Flammable, hazardous.</text:p>
          </table:table-cell>
          <table:table-cell table:style-name="ce19" office:value-type="string" calcext:value-type="string">
            <text:p>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Dissolving shellac flakes, alcohol-based stains, fuel for spirit lamps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Isopropyl Alcohol</text:p>
          </table:table-cell>
          <table:table-cell/>
          <table:table-cell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Solvent, cleaning, shellac thinner, sanitiser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olvent</text:p>
          </table:table-cell>
          <table:table-cell table:style-name="ce15" office:value-type="string" calcext:value-type="string">
            <text:p>Mineral Spirits / White Spirit</text:p>
          </table:table-cell>
          <table:table-cell table:style-name="ce17" office:value-type="string" calcext:value-type="string">
            <text:p>Petroleum distillate. Thins oil paint and varnishes, cleans brushes. OMS is odorless variant.</text:p>
          </table:table-cell>
          <table:table-cell table:style-name="ce19" office:value-type="string" calcext:value-type="string">
            <text:p>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table:style-name="ce13" office:value-type="string" calcext:value-type="string">
            <text:p>Thinning oil paint and varnish, cleaning brushes, degreasing, removing wax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EPS Foam (Expanded Polystyrene)</text:p>
          </table:table-cell>
          <table:table-cell office:value-type="string" calcext:value-type="string">
            <text:p>White bead foam. Extremely lightweight, carvable with hot wire. Solvent-sensitive — water-based paints only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Large sculpture volume, theatrical props, scenic elements, lost-foam casting, armature, Lost-foam casting, lightweight armature, insulation, carv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tructure</text:p>
          </table:table-cell>
          <table:table-cell table:style-name="ce15" office:value-type="string" calcext:value-type="string">
            <text:p>Woven Polypropylene Bags</text:p>
          </table:table-cell>
          <table:table-cell table:style-name="ce17" office:value-type="string" calcext:value-type="string">
            <text:p>Dog food, feed, rice bags. Industrial-grade woven PP textile. Sewable, unravelable into tape strips, heat-weldable.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8" office:value-type="string" calcext:value-type="string">
            <text:p>Waterproof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Totes, basketry strips, structural fabric, weaving, sandbags, earthbag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XPS Foam (Extruded Polystyrene)</text:p>
          </table:table-cell>
          <table:table-cell office:value-type="string" calcext:value-type="string">
            <text:p>Pink or blue rigid insulation board. Denser than EPS, smoother surface, better detail. Solvent-sensitive.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Scenic terrain, rock forms, carving, insulation, lightweight set construction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urface</text:p>
          </table:table-cell>
          <table:table-cell table:style-name="ce15" office:value-type="string" calcext:value-type="string">
            <text:p>Anodising Solution (Sodium Bisulfate)</text:p>
          </table:table-cell>
          <table:table-cell table:style-name="ce17" office:value-type="string" calcext:value-type="string">
            <text:p>Safer electrolyte for DIY aluminum anodising. Produces thickened oxide layer that accepts dye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30" office:value-type="string" calcext:value-type="string">
            <text:p>Caust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Aluminum surface coloring, anodising, jewellery finishing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atina Chemicals</text:p>
          </table:table-cell>
          <table:table-cell/>
          <table:table-cell office:value-type="string" calcext:value-type="string">
            <text:p>$$</text:p>
          </table:table-cell>
          <table:table-cell table:style-name="ce22" office:value-type="string" calcext:value-type="string">
            <text:p>3 — High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Metal surface coloring — varies by specific chemical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Surface</text:p>
          </table:table-cell>
          <table:table-cell table:style-name="ce15" office:value-type="string" calcext:value-type="string">
            <text:p>Saline Sulfate Etch (Copper Sulfate + Salt)</text:p>
          </table:table-cell>
          <table:table-cell table:style-name="ce17" office:value-type="string" calcext:value-type="string">
            <text:p>Low-hazard ferric chloride alternative for etching copper and aluminum. Developed for printmaking safety.</text:p>
          </table:table-cell>
          <table:table-cell table:style-name="ce19"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9" office:value-type="string" calcext:value-type="string">
            <text:p>Toxi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finite</text:p>
          </table:table-cell>
          <table:table-cell table:style-name="ce13" office:value-type="string" calcext:value-type="string">
            <text:p>Metal etching for printmaking, decorative metalwork, circuit board etching alternativ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cenic Dope</text:p>
          </table:table-cell>
          <table:table-cell/>
          <table:table-cell office:value-type="string" calcext:value-type="string">
            <text:p>$$</text:p>
          </table:table-cell>
          <table:table-cell table:style-name="ce21" office:value-type="string" calcext:value-type="string">
            <text:p>2 — Med</text:p>
          </table:table-cell>
          <table:table-cell table:style-name="ce25" office:value-type="string" calcext:value-type="string">
            <text:p>Flammabl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20–100 Years</text:p>
          </table:table-cell>
          <table:table-cell office:value-type="string" calcext:value-type="string">
            <text:p>Stiffening fabric for theatrical scenery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table:style-name="ce13" office:value-type="string" calcext:value-type="string">
            <text:p>Tape</text:p>
          </table:table-cell>
          <table:table-cell table:style-name="ce15" office:value-type="string" calcext:value-type="string">
            <text:p>Gaffer Tape</text:p>
          </table:table-cell>
          <table:table-cell table:style-name="ce17"/>
          <table:table-cell table:style-name="ce19" office:value-type="string" calcext:value-type="string">
            <text:p>$$</text:p>
          </table:table-cell>
          <table:table-cell office:value-type="string" calcext:value-type="string">
            <text:p>1 — Low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39" office:value-type="string" calcext:value-type="string">
            <text:p>Resistant</text:p>
          </table:table-cell>
          <table:table-cell table:style-name="ce40" office:value-type="string" calcext:value-type="string">
            <text:p>20–100 Years</text:p>
          </table:table-cell>
          <table:table-cell table:style-name="ce13" office:value-type="string" calcext:value-type="string">
            <text:p>Temporary bonding, cable management, theatrical use</text:p>
          </table:table-cell>
          <table:table-cell table:number-columns-repeated="16368"/>
        </table:table-row>
        <table:table-row table:style-name="ro5">
          <table:table-cell office:value-type="string" calcext:value-type="string">
            <text:p>Industrial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Gummed Tape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1 — Low</text:p>
          </table:table-cell>
          <table:table-cell/>
          <table:table-cell table:style-name="ce35" office:value-type="string" calcext:value-type="string">
            <text:p>P</text:p>
          </table:table-cell>
          <table:table-cell table:number-columns-repeated="2" office:value-type="string" calcext:value-type="string">
            <text:p>Y</text:p>
          </table:table-cell>
          <table:table-cell table:style-name="ce36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2–20 Years</text:p>
          </table:table-cell>
          <table:table-cell office:value-type="string" calcext:value-type="string">
            <text:p>Paper sealing, bookbinding, parcel wrapping</text:p>
          </table:table-cell>
          <table:table-cell table:number-columns-repeated="16368"/>
        </table:table-row>
      </table:table>
      <table:table table:name="Legend" table:style-name="ta2">
        <table:table-column table:style-name="co13" table:default-cell-style-name="ce44"/>
        <table:table-column table:style-name="co14" table:default-cell-style-name="ce44"/>
        <table:table-column table:style-name="co12" table:number-columns-repeated="16382" table:default-cell-style-name="Default"/>
        <table:table-row table:style-name="ro2">
          <table:table-cell table:style-name="ce43" office:value-type="string" calcext:value-type="string">
            <text:p>PRIMARY CATEGORIES</text:p>
          </table:table-cell>
          <table:table-cell table:style-name="ce43"/>
          <table:table-cell table:number-columns-repeated="16382"/>
        </table:table-row>
        <table:table-row table:style-name="ro2">
          <table:table-cell office:value-type="string" calcext:value-type="string">
            <text:p>Grocery</text:p>
          </table:table-cell>
          <table:table-cell office:value-type="string" calcext:value-type="string">
            <text:p>Available from a supermarket or food 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aged</text:p>
          </table:table-cell>
          <table:table-cell office:value-type="string" calcext:value-type="string">
            <text:p>Collected from nature, scavenged, or recovered from the waste st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ft</text:p>
          </table:table-cell>
          <table:table-cell office:value-type="string" calcext:value-type="string">
            <text:p>Art supply, craft, or specialist maker sh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al</text:p>
          </table:table-cell>
          <table:table-cell office:value-type="string" calcext:value-type="string">
            <text:p>Hardware store, builders merchant, or online industrial supplie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43" office:value-type="string" calcext:value-type="string">
            <text:p>COLUMNS</text:p>
          </table:table-cell>
          <table:table-cell table:style-name="ce43"/>
          <table:table-cell table:number-columns-repeated="16382"/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Primary source catego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Material type — single wo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st</text:p>
          </table:table-cell>
          <table:table-cell office:value-type="string" calcext:value-type="string">
            <text:p>$ to $$$$$ — approximate cost at school / small-batch quantiti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fety</text:p>
          </table:table-cell>
          <table:table-cell office:value-type="string" calcext:value-type="string">
            <text:p>1 Low · 2 Med · 3 High · 4 Caution — intrinsic hazard in working st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None · Inhalant · Irritant · Caustic · Toxic · Flammable · Reactive · Carcinogen · Biolog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c</text:p>
          </table:table-cell>
          <table:table-cell office:value-type="string" calcext:value-type="string">
            <text:p>Y = no synthetic processing (includes minerals and plant/animal materia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Y = no animal slaughter byproducts (beeswax, dairy, eggs are OK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gan</text:p>
          </table:table-cell>
          <table:table-cell office:value-type="string" calcext:value-type="string">
            <text:p>Y = no animal products or byproducts of any k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odegradable</text:p>
          </table:table-cell>
          <table:table-cell office:value-type="string" calcext:value-type="string">
            <text:p>Y = Yes · P = Partial · N = N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ow Your Own</text:p>
          </table:table-cell>
          <table:table-cell office:value-type="string" calcext:value-type="string">
            <text:p>Y = can be cultivated, foraged, or made from household/local was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terproof</text:p>
          </table:table-cell>
          <table:table-cell office:value-type="string" calcext:value-type="string">
            <text:p>None · Resistant · Waterproof — unfinished material in working st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vity</text:p>
          </table:table-cell>
          <table:table-cell office:value-type="string" calcext:value-type="string">
            <text:p>&lt; 1 Year · 2–20 Years · 20–100 Years · Indefini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s</text:p>
          </table:table-cell>
          <table:table-cell office:value-type="string" calcext:value-type="string">
            <text:p>Primary uses across Sources, Stock, and Application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43" office:value-type="string" calcext:value-type="string">
            <text:p>NOTES</text:p>
          </table:table-cell>
          <table:table-cell table:style-name="ce43"/>
          <table:table-cell table:number-columns-repeated="16382"/>
        </table:table-row>
        <table:table-row table:style-name="ro2">
          <table:table-cell office:value-type="string" calcext:value-type="string">
            <text:p>Pigments</text:p>
          </table:table-cell>
          <table:table-cell office:value-type="string" calcext:value-type="string">
            <text:p>Foraged pigments include earth pigments (ochres, hematite, limonite) and carbon blacks. Many can be made from local soil, plant ash, or charred organic matter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gitive pigments</text:p>
          </table:table-cell>
          <table:table-cell office:value-type="string" calcext:value-type="string">
            <text:p>Beet, turmeric, avocado, spirulina — vivid but fade over time. Good for demonstrations and temporary work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ination hazards</text:p>
          </table:table-cell>
          <table:table-cell office:value-type="string" calcext:value-type="string">
            <text:p>Ratings are for the material in isolation. Combination hazards are noted in individual book entries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lling</text:p>
          </table:table-cell>
          <table:table-cell office:value-type="string" calcext:value-type="string">
            <text:p>American English: fiber, color, mold, aluminum, gray, sulfur.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Materials.A3:Materials.P36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egend" style:display-name="PageStyle_Lege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4-30T20:41:02</meta:creation-date>
    <dc:date>2026-05-01T08:46:22.660438202</dc:date>
    <meta:generator>LibreOffice/24.2.7.2$Linux_X86_64 LibreOffice_project/420$Build-2</meta:generator>
    <meta:editing-duration>PT1M26S</meta:editing-duration>
    <meta:editing-cycles>1</meta:editing-cycles>
    <meta:document-statistic meta:table-count="2" meta:cell-count="5226" meta:object-count="0"/>
    <meta:user-defined meta:name="AppVersion">3.1</meta:user-defined>
  </office:meta>
</office:document-meta>
</file>